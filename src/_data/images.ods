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339in"/>
    </style:style>
    <style:style style:name="co2" style:family="table-column">
      <style:table-column-properties fo:break-before="auto" style:column-width="0.889in"/>
    </style:style>
    <style:style style:name="co3" style:family="table-column">
      <style:table-column-properties fo:break-before="auto" style:column-width="2.8201in"/>
    </style:style>
    <style:style style:name="co4" style:family="table-column">
      <style:table-column-properties fo:break-before="auto" style:column-width="2.8417in"/>
    </style:style>
    <style:style style:name="co5" style:family="table-column">
      <style:table-column-properties fo:break-before="auto" style:column-width="1.7583in"/>
    </style:style>
    <style:style style:name="co6" style:family="table-column">
      <style:table-column-properties fo:break-before="auto" style:column-width="2.0047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2" table:default-cell-style-name="Default"/>
        <table:table-column table:style-name="co6" table:default-cell-style-name="Default"/>
        <table:table-row table:style-name="ro1">
          <table:table-cell office:value-type="string" calcext:value-type="string">
            <text:p>filename</text:p>
          </table:table-cell>
          <table:table-cell office:value-type="string" calcext:value-type="string">
            <text:p>date</text:p>
          </table:table-cell>
          <table:table-cell office:value-type="string" calcext:value-type="string">
            <text:p>alt</text:p>
          </table:table-cell>
          <table:table-cell office:value-type="string" calcext:value-type="string">
            <text:p>caption</text:p>
          </table:table-cell>
          <table:table-cell office:value-type="string" calcext:value-type="string">
            <text:p>artist</text:p>
          </table:table-cell>
          <table:table-cell office:value-type="string" calcext:value-type="string">
            <text:p>nationality</text:p>
          </table:table-cell>
          <table:table-cell office:value-type="string" calcext:value-type="string">
            <text:p>tags</text:p>
          </table:table-cell>
        </table:table-row>
        <table:table-row table:style-name="ro2">
          <table:table-cell office:value-type="string" calcext:value-type="string">
            <text:p>vanitas_still_life_1995.74.2.jpg</text:p>
          </table:table-cell>
          <table:table-cell office:value-type="float" office:value="1665" calcext:value-type="float">
            <text:p>1665</text:p>
          </table:table-cell>
          <table:table-cell table:style-name="ce1" office:value-type="string" calcext:value-type="string">
            <text:p>A skull, a glass vase of flowers, an hourglass, and two small dishes are arranged on a charcoal-gray ledge against a fawn-brown background in this vertical still life painting. Soap bubbles float around the objects to our right, and several insects alight on the flowers or ledge. At the center of the composition, the dark, parchment-colored skull is missing the lower jaw and front teeth, and the crown is wrapped with a single stalk of wheat. To our right of the skull and tucked in near the hollow of the cheek, a short, glass vase with a bulbous bottom, narrow neck, and slightly flaring lip holds four blush-pink flowers, perhaps roses, along with a white flower and a red one, perhaps carnations. A vine of royal-blue, trumpet-like flowers with pale yellow centers could be morning glories. Three of the pink roses are in full bloom and one, near the hourglass, is in bud form. The red and white carnations rest next to each other on or near the top of the skull. Deep green leaves fill the spaces between the loosely gathered flowers. Next to the vase, to our right, an hourglass has a cedar-red wooden frame, and about half the sand has dropped into the bottom bulb. A shallow dish, perhaps a shell, sits atop the hourglass with a short straw or stick resting against the lip to our right. One glistening soap bubble perches on the far end of the straw. Another small bowl and stick, this set of burnished gold, sits between the vase and skull. One of the blooming roses rests next to the skull, on the front left corner of the ledge. Several delicate soap bubbles rise above the hourglass along the right side of the painting. A golden brown moth with white markings floats above the bubbles, about to land on one of the roses. On the opposite side, a white moth with one black spot on its wing rests on a leaf near another rose. A white moth with black speckled wings clings to the front of the ledge, and a black and dark caterpillar flecked with gold climbs up under it. The artist painted his initials, “JVK,” on the front of the ledge, near a small red beetle. Light falls across the still life from our left, and panes from a window outside our view are reflected in the bubbles and on the glass vase.</text:p>
          </table:table-cell>
          <table:table-cell office:value-type="string" calcext:value-type="string">
            <text:p>[Vanitas Still Life](<text:a xlink:href="https://www.nga.gov/artworks/93323-vanitas-still-life" xlink:type="simple">https://www.nga.gov/artworks/93323-vanitas-still-life</text:a>) by Jan van Kessel the Elder. c. 1665/1670</text:p>
          </table:table-cell>
          <table:table-cell office:value-type="string" calcext:value-type="string">
            <text:p>Jan van Kessel the Elder</text:p>
          </table:table-cell>
          <table:table-cell office:value-type="string" calcext:value-type="string">
            <text:p>Flemish</text:p>
          </table:table-cell>
          <table:table-cell office:value-type="string" calcext:value-type="string">
            <text:p>flowers</text:p>
          </table:table-cell>
        </table:table-row>
        <table:table-row table:style-name="ro2">
          <table:table-cell office:value-type="string" calcext:value-type="string">
            <text:p>a_chief_of_abyssinia_2014.136.74.jpg</text:p>
          </table:table-cell>
          <table:table-cell office:value-type="float" office:value="1870" calcext:value-type="float">
            <text:p>1870</text:p>
          </table:table-cell>
          <table:table-cell office:value-type="string" calcext:value-type="string">
            <text:p>Shown from the shoulders up and from a low vantage point, a man with dark brown skin and black hair looks up and to our left in this vertical portrait painting. His shoulders are angled to our right, but he turns his head to look off with dark eyes. His lower lip comes slightly forward from the upper, and his mustache continues in lines from the corners of his mouth down to his square jawline. His hair creates a halo around his face, and a crimson-red cloth wraps across his shoulders. He is lit from our upper right, and the background brightens from golden yellow along the right edge of the canvas to vivid, shimmering yellow to the left. The portrait is loosely painted, especially in the clothing and the background. </text:p>
          </table:table-cell>
          <table:table-cell office:value-type="string" calcext:value-type="string">
            <text:p>[A Chief of Abyssinia](<text:a xlink:href="https://www.nga.gov/artworks/168756-chief-abyssinia" xlink:type="simple">https://www.nga.gov/artworks/168756-chief-abyssinia</text:a>) by Henri Regnault. c. 1870</text:p>
          </table:table-cell>
          <table:table-cell office:value-type="string" calcext:value-type="string">
            <text:p>Henri Regnaul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the_favorite_of_the_emir_2010.95.1.jpg</text:p>
          </table:table-cell>
          <table:table-cell office:value-type="float" office:value="1879" calcext:value-type="float">
            <text:p>1879</text:p>
          </table:table-cell>
          <table:table-cell office:value-type="string" calcext:value-type="string">
            <text:p>This horizontal painting shows a daylit, covered terrace, where two women with pale skin and wearing long dresses lounge and recline along a ledge as a turbaned man with dark brown skin plays a musical instrument. To our left, behind one of the women, the musician's white turban drapes around his neck. His white shirt has wide, salmon-pink cuffs. His head is bent over a stringed instrument with a light yellow rounded body and a long, narrow wooden neck. His features are mostly lost in shadow but his closed lips are dark pink. Behind and framing the musician, a dark green drapery with gold edging cuts across the top left corner of the painting and is drawn back to reveal a bright sea view beyond. Close to us, one woman wears an orange-red dress with gold embroidery and a low-cut transparent blouse that shows her pale skin beneath. She lounges on her back, head near the musician, and body splayed along the ledge out toward our right. Her eyes are half-closed, and her head rests on a large gold pillow with green and pink embroidery over which her long, dark red hair cascades. Her left arm is bent and thrown back behind her head while her right arm hangs limply toward the floor. Her extended legs are bent, and feet with red and gold pointed slippers emerge from the bottom of the dress. Beyond her legs and to our right, the second woman reclines in a gold and cream-white dress with a filmy top and gold jacket. She rests her head in her hand, propped up by a crooked elbow resting on the ledge, while her body extends to our right. She gazes at us with dark eyes. She has dark brown, wavy hair that flows behind her shoulders, and she wears a gold headband with round, coin-like links. Beyond the group of three, another man stands to the far right in the background, in a corner of the terrace patio next to a pillar. Like the other man, he has dark brown skin and wears a turban, a loose white shirt under a yellow vest, and light blue, loose trousers. The back of the terrace opens to a bright and sunny day, the light blue sky scattered with thin white clouds above a vivid blue sea, where three sailboats approach the port. Distant mountains are bathed in light and appear pink, beyond the white roofs of the port or village along the water's edge, to our left. </text:p>
          </table:table-cell>
          <table:table-cell office:value-type="string" calcext:value-type="string">
            <text:p>[The Favorite of the Emir](<text:a xlink:href="https://www.nga.gov/artworks/75181-favorite-emir" xlink:type="simple">https://www.nga.gov/artworks/75181-favorite-emir</text:a>) by Jean Joseph Benjamin Constant. c. 1879</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nonchaloir_repose_1948.16.1.jpg</text:p>
          </table:table-cell>
          <table:table-cell office:value-type="float" office:value="1911" calcext:value-type="float">
            <text:p>1911</text:p>
          </table:table-cell>
          <table:table-cell office:value-type="string" calcext:value-type="string">
            <text:p>A woman with pale skin and dark brown hair is swathed in silky fabric as she reclines along a gray couch in this horizontal painting. Her head rests along the backrest of the sofa to our left, so her body extends to our right. Her torso is wrapped in a voluminous, ivory-white scarf or wrap. The scarf wraps tightly around her neck, and the bottom edge, near her knees, has a wide, indigo-blue pattern of ovals and vegetal forms. Her shimmering silver gray skirt is painted loosely with baby and sky blue, olive and sage green, and white strokes, and it drapes over the cushions and down the front of the couch. Her hands are clasped so her interwoven fingers rest at her navel. She looks down and off to our right. A table to our left is edged with gold. The wall behind her, above the couch, is painted with long streaks of eggshell white and pale turquoise. The gold frame of a dark painting hanging over the couch spans the width of the composition. Near the upper right corner of the canvas, the artist included a signature and as if he had signed the painting within this painting with loose, dark letters: “John S. Sargent 1911.” </text:p>
          </table:table-cell>
          <table:table-cell office:value-type="string" calcext:value-type="string">
            <text:p>[Nonchaloir (Repose)](<text:a xlink:href="https://www.nga.gov/artworks/35080-nonchaloir-repose" xlink:type="simple">https://www.nga.gov/artworks/35080-nonchaloir-repose</text:a>) by John Singer Sargent. 1911</text:p>
          </table:table-cell>
          <table:table-cell office:value-type="string" calcext:value-type="string">
            <text:p>John Singer Sargent</text:p>
          </table:table-cell>
          <table:table-cell office:value-type="string" calcext:value-type="string">
            <text:p>American</text:p>
          </table:table-cell>
          <table:table-cell office:value-type="string" calcext:value-type="string">
            <text:p>people</text:p>
          </table:table-cell>
        </table:table-row>
        <table:table-row table:style-name="ro2">
          <table:table-cell office:value-type="string" calcext:value-type="string">
            <text:p>young_woman_with_peonies_1983.1.6.jpg</text:p>
          </table:table-cell>
          <table:table-cell office:value-type="float" office:value="1870" calcext:value-type="float">
            <text:p>1870</text:p>
          </table:table-cell>
          <table:table-cell office:value-type="string" calcext:value-type="string">
            <text:p>Holding a bunch of peonies in one hand, a woman with brown skin leans forward, toward us from behind a large basket holding dozens of flowers in this horizontal painting. The basket holding the flowers spans the width of the canvas, and the woman is shown behind it from the chest up. She wears a cream-white, long-sleeved blouse with scalloped trim around the high neck. She wears coral-red earrings, and a plaid cloth in tones of rust red, slate blue, pale purple, and black is tied tightly over her black hair, which is visible over her ears. Her brow is slightly furrowed, and she looks at us with large, dark eyes. Her full mouth is closed, the corners faintly downturned. She reaches her right arm, on our left, toward us with a bouquet of three pink-and-white peonies and greenery. Her basket is filled with yellow and red tulips, pink roses, white and purple lilac, and other white, pink, yellow, and blue flowers, and it takes up the bottom third of the composition. The woman and basket are shown against a dove-gray background. The artist prominently signed and dated the work with red letters near the upper right corner, near the woman’s head: “F. Bazille. 1870.” </text:p>
          </table:table-cell>
          <table:table-cell office:value-type="string" calcext:value-type="string">
            <text:p>[Young Woman with Peonies](<text:a xlink:href="https://www.nga.gov/artworks/61356-young-woman-peonies" xlink:type="simple">https://www.nga.gov/artworks/61356-young-woman-peonies</text:a>) by Frédéric Bazille. 1870</text:p>
          </table:table-cell>
          <table:table-cell office:value-type="string" calcext:value-type="string">
            <text:p>Frédéric Bazille</text:p>
          </table:table-cell>
          <table:table-cell office:value-type="string" calcext:value-type="string">
            <text:p>French</text:p>
          </table:table-cell>
          <table:table-cell office:value-type="string" calcext:value-type="string">
            <text:p>people, flowers</text:p>
          </table:table-cell>
        </table:table-row>
        <table:table-row table:style-name="ro2">
          <table:table-cell office:value-type="string" calcext:value-type="string">
            <text:p>flowers_in_a_vase_1976.26.2.jpg</text:p>
          </table:table-cell>
          <table:table-cell office:value-type="float" office:value="1700" calcext:value-type="float">
            <text:p>1700</text:p>
          </table:table-cell>
          <table:table-cell office:value-type="string" calcext:value-type="string">
            <text:p><text:s/>A profusion of flowers mostly in ruby red, bright white, and flamingo pink are gathered in a bronze-colored urn, set on a stone ledge against a dark background in this vertical still life painting. A band of flowers reaching from the lower left to the upper right draw the eye, and are made up of a pink rose at the bottom under a white rose, a white-and-red streaked tulip, and a crimson-red poppy near the upper right. Other flowers include a sprig of pale, nearly white lilac to the left, sapphire-blue morning glories, golden stalks of wheat, and green leaves interspersed throughout. The urn has a fluted, flaring foot. Upon closer inspection we find that the foot must belong to a much larger vessel, for a terracotta-colored person reclining next to a stylized fish emerges from behind the flowers at the upper left. An ivory-white butterfly with an orange spot on each wing alights on the tulip, whose petals are spread wide. A snail with a marmalade-orange shell with a thin, shiny, black spiral crawls along the ledge to our right, and on the stone ledge to our left, an earwig eats a honey-yellow caterpillar. The flowers and insects are brightly lit from our left, and the chocolate-brown background is swallowed in shadow. A partially legible inscription in the lower right reads, “Kouwe be h.” </text:p>
          </table:table-cell>
          <table:table-cell office:value-type="string" calcext:value-type="string">
            <text:p>[Flowers in a Vase](<text:a xlink:href="https://www.nga.gov/artworks/55782-flowers-vase" xlink:type="simple">https://www.nga.gov/artworks/55782-flowers-vase</text:a>) by Philip van Kouwenbergh. c. 1700</text:p>
          </table:table-cell>
          <table:table-cell office:value-type="string" calcext:value-type="string">
            <text:p>Philip van Kouwenbergh</text:p>
          </table:table-cell>
          <table:table-cell office:value-type="string" calcext:value-type="string">
            <text:p>Dutch</text:p>
          </table:table-cell>
          <table:table-cell office:value-type="string" calcext:value-type="string">
            <text:p>flowers</text:p>
          </table:table-cell>
        </table:table-row>
        <table:table-row table:style-name="ro2">
          <table:table-cell office:value-type="string" calcext:value-type="string">
            <text:p>miss_beatrice_townsend_2006.128.31.jpg</text:p>
          </table:table-cell>
          <table:table-cell office:value-type="float" office:value="1882" calcext:value-type="float">
            <text:p>1882</text:p>
          </table:table-cell>
          <table:table-cell office:value-type="string" calcext:value-type="string">
            <text:p>Shown from the hips up, a pale-skinned young girl wearing an ink-black garment with a cream-white collar and a coral-red sash and necklaces holds a terrier dog as she looks at us in this vertical portrait painting. The artist used brushstrokes throughout, especially in the hair, clothing, dog, and background. The girl’s body is slightly angled to our left but she turns her oval face to us. She slightly cocks one faint brow as she gazes out with large, pale blue eyes. She has smooth cheeks, and her full, red lips are closed. Her chestnut-brown hair curtains her forehead in thick bangs and falls down past her shoulders. Her black dress has long, tightly-fitting sleeves and is cinched with a wide, oversized red sash, presumably tied at the back. A multi-stranded, coral-red necklace lies over her layered, cream-white lace collar, which extends just past her shoulders. A long, white cuff falls over her left wrist, down by her side. With her other hand, to our left, she supports the terrier against her right hip. The long fur around the dog’s dark eyes is shimmering, flax brown. Caramel-brown ears poke up on its shaggy head. The girl holds the dog's tail in that hand. The background behind the pair lightens from fawn brown across the top to golden brown along the bottom edge. The artist inscribed and signed the painting in slanting, cursive letters at the top right corner: “to my friend Mrs Townsend John S. Sargent.” </text:p>
          </table:table-cell>
          <table:table-cell office:value-type="string" calcext:value-type="string">
            <text:p>[Miss Beatrice Townsend](<text:a xlink:href="https://www.nga.gov/artworks/96999-miss-beatrice-townsend" xlink:type="simple">https://www.nga.gov/artworks/96999-miss-beatrice-townsend</text:a>) by John Singer Sargent. 1882</text:p>
          </table:table-cell>
          <table:table-cell office:value-type="string" calcext:value-type="string">
            <text:p>John Singer Sargent</text:p>
          </table:table-cell>
          <table:table-cell office:value-type="string" calcext:value-type="string">
            <text:p>American</text:p>
          </table:table-cell>
          <table:table-cell office:value-type="string" calcext:value-type="string">
            <text:p>people, animals</text:p>
          </table:table-cell>
        </table:table-row>
        <table:table-row table:style-name="ro2">
          <table:table-cell office:value-type="string" calcext:value-type="string">
            <text:p>Louis_Eugène_Lambert_-_Family_of_Cats_and_a_Dog_in_the_Salon.jpg</text:p>
          </table:table-cell>
          <table:table-cell office:value-type="float" office:value="1893" calcext:value-type="float">
            <text:p>1893</text:p>
          </table:table-cell>
          <table:table-cell office:value-type="string" calcext:value-type="string">
            <text:p>Louis Eugène Lambert - Family of Cats and a Dog in the Salon</text:p>
          </table:table-cell>
          <table:table-cell office:value-type="string" calcext:value-type="string">
            <text:p>[Family of Cats and a Dog](<text:a xlink:href="https://commons.wikimedia.org/wiki/File:Louis_Eugène_Lambert_-_Family_of_Cats_and_a_Dog_in_the_Salon.jpg" xlink:type="simple">https://commons.wikimedia.org/wiki/File:Louis_Eug%C3%A8ne_Lambert_-_Family_of_Cats_and_a_Dog_in_the_Salon.jpg</text:a>) in the Salon by Louis-Eugène Lambert. 1893</text:p>
          </table:table-cell>
          <table:table-cell office:value-type="string" calcext:value-type="string">
            <text:p>Louis-Eugène Lambert</text:p>
          </table:table-cell>
          <table:table-cell office:value-type="string" calcext:value-type="string">
            <text:p>French</text:p>
          </table:table-cell>
          <table:table-cell office:value-type="string" calcext:value-type="string">
            <text:p>animals</text:p>
          </table:table-cell>
        </table:table-row>
        <table:table-row table:style-name="ro2">
          <table:table-cell office:value-type="string" calcext:value-type="string">
            <text:p>Winslow_Homer_-_The_Four_Leaf_Clover.jpg</text:p>
          </table:table-cell>
          <table:table-cell office:value-type="float" office:value="1873" calcext:value-type="float">
            <text:p>1873</text:p>
          </table:table-cell>
          <table:table-cell office:value-type="string" calcext:value-type="string">
            <text:p>Winslow Homer - The Four-Leaf Clover</text:p>
          </table:table-cell>
          <table:table-cell office:value-type="string" calcext:value-type="string">
            <text:p>[The Four Leaf Clover](<text:a xlink:href="https://dia.org/collection/four-leaf-clover/48265" xlink:type="simple">https://dia.org/collection/four-leaf-clover/48265</text:a>) by Winslow Homer. 1873</text:p>
          </table:table-cell>
          <table:table-cell office:value-type="string" calcext:value-type="string">
            <text:p>Winslow Homer</text:p>
          </table:table-cell>
          <table:table-cell office:value-type="string" calcext:value-type="string">
            <text:p>American</text:p>
          </table:table-cell>
          <table:table-cell office:value-type="string" calcext:value-type="string">
            <text:p>people</text:p>
          </table:table-cell>
        </table:table-row>
        <table:table-row table:style-name="ro2">
          <table:table-cell office:value-type="string" calcext:value-type="string">
            <text:p>DP3572.jpeg</text:p>
          </table:table-cell>
          <table:table-cell office:value-type="float" office:value="1888" calcext:value-type="float">
            <text:p>1888</text:p>
          </table:table-cell>
          <table:table-cell office:value-type="string" calcext:value-type="string">
            <text:p>Childe Hassam – Gathering Flowers in a French Garden</text:p>
          </table:table-cell>
          <table:table-cell office:value-type="string" calcext:value-type="string">
            <text:p>[Gathering Flowers in a French Garden](<text:a xlink:href="https://worcester.emuseum.com/objects/20384/gathering-flowers-in-a-french-garden" xlink:type="simple">https://worcester.emuseum.com/objects/20384/gathering-flowers-in-a-french-garden</text:a>) by Childe Hassam. 1888</text:p>
          </table:table-cell>
          <table:table-cell office:value-type="string" calcext:value-type="string">
            <text:p>Childe Hassam</text:p>
          </table:table-cell>
          <table:table-cell office:value-type="string" calcext:value-type="string">
            <text:p>American</text:p>
          </table:table-cell>
          <table:table-cell office:value-type="string" calcext:value-type="string">
            <text:p>people, flowers</text:p>
          </table:table-cell>
        </table:table-row>
        <table:table-row table:style-name="ro2">
          <table:table-cell office:value-type="string" calcext:value-type="string">
            <text:p>woman_with_a_cat_1950.12.1.jpg</text:p>
          </table:table-cell>
          <table:table-cell office:value-type="float" office:value="1875" calcext:value-type="float">
            <text:p>1875</text:p>
          </table:table-cell>
          <table:table-cell office:value-type="string" calcext:value-type="string">
            <text:p>Shown from about the waist up, a young woman wearing white sits in an armchair cuddling a brown and black striped cat in this vertical painting. The scene is painted with blended brushstrokes, giving it a soft look. The wall behind them is seafoam green, and the edge of a yellow floral curtain lines the left edge of the canvas. The woman’s body is angled to our right and she looks at the cat with dark eyes. The woman’s light brown hair is pulled up, and her pale skin is accentuated by rosy cheeks. Her bare arms enfold the cat, held upright against the left side of her body so its head rests against her cheek. She supports the cat’s upper body with her right hand, on which she wears an emerald ring. The cat’s lower body nestles into the crook of the woman’s left arm. Its paws are extended and its head pulled back. The white and blue tones of the woman’s short-sleeved dress and kerchief tied around her neck contrast against the muted burgundy-red of the armchair behind her. To our right, behind the woman, vibrant, loose brushstrokes in red, orange, green, violet, and white could be a floral arrangement. </text:p>
          </table:table-cell>
          <table:table-cell office:value-type="string" calcext:value-type="string">
            <text:p>[Woman with a Cat](<text:a xlink:href="https://www.nga.gov/artworks/37637-woman-cat" xlink:type="simple">https://www.nga.gov/artworks/37637-woman-cat</text:a>) by Auguste Renoir. c. 1875</text:p>
          </table:table-cell>
          <table:table-cell office:value-type="string" calcext:value-type="string">
            <text:p>Auguste Renoir</text:p>
          </table:table-cell>
          <table:table-cell office:value-type="string" calcext:value-type="string">
            <text:p>French</text:p>
          </table:table-cell>
          <table:table-cell office:value-type="string" calcext:value-type="string">
            <text:p>people, animals</text:p>
          </table:table-cell>
        </table:table-row>
        <table:table-row table:style-name="ro2">
          <table:table-cell office:value-type="string" calcext:value-type="string">
            <text:p>youth_making_a_face_1994.46.1.jpg</text:p>
          </table:table-cell>
          <table:table-cell office:value-type="float" office:value="1635" calcext:value-type="float">
            <text:p>1635</text:p>
          </table:table-cell>
          <table:table-cell office:value-type="string" calcext:value-type="string">
            <text:p>A young man with tanned, peachy skin sits at a table pulling his mouth wide with both hands in this vertical painting. On the far side of a wooden table, he faces us with elbows splayed wide. He has hooked the first finger of each hand into the corners of his mouth to stretch his open lips into a long, goofy line. He has wide-set eyes and a wide nose. His brown hair sticks out from under a tall, fuzzy brown hat, which has a knife secured by the blade in a loop to our left. The man’s iron-gray jacket has coffee-brown sleeves with the white of his shirt showing at the cuffs. A putty-gray jug accented with washes of rust-red and a glass filled with an amber liquid sit on the table before him. Soft light from the upper left gleams white on these smooth surfaces. A dark mass visible under the table is presumably the tops of his legs. The top right corner of his wooden chair is visible over his right shoulder, on our left, and he is set against a dove-gray background. The scene is loosely painted so brushstrokes are especially visible in the man’s face and hands. </text:p>
          </table:table-cell>
          <table:table-cell office:value-type="string" calcext:value-type="string">
            <text:p>[Youth Making a Face](<text:a xlink:href="https://www.nga.gov/artworks/86204-youth-making-face" xlink:type="simple">https://www.nga.gov/artworks/86204-youth-making-face</text:a>) by Adriaen Brouwer. c. 1632/1635</text:p>
          </table:table-cell>
          <table:table-cell office:value-type="string" calcext:value-type="string">
            <text:p>Adriaen Brouwer</text:p>
          </table:table-cell>
          <table:table-cell office:value-type="string" calcext:value-type="string">
            <text:p>Flemish</text:p>
          </table:table-cell>
          <table:table-cell office:value-type="string" calcext:value-type="string">
            <text:p>people</text:p>
          </table:table-cell>
        </table:table-row>
        <table:table-row table:style-name="ro2">
          <table:table-cell office:value-type="string" calcext:value-type="string">
            <text:p>Louis_Eugène_Lambert_Stolze_Katzenmutter.jpg</text:p>
          </table:table-cell>
          <table:table-cell office:value-type="float" office:value="1900" calcext:value-type="float">
            <text:p>1900</text:p>
          </table:table-cell>
          <table:table-cell office:value-type="string" calcext:value-type="string">
            <text:p>Louis-Eugène Lambert - Stolze Katzenmutter</text:p>
          </table:table-cell>
          <table:table-cell office:value-type="string" calcext:value-type="string">
            <text:p>[Stolze Katzenmutter](<text:a xlink:href="https://commons.wikimedia.org/wiki/File:Louis_Eugène_Lambert_Stolze_Katzenmutter.jpg" xlink:type="simple">https://commons.wikimedia.org/wiki/File:Louis_Eug%C3%A8ne_Lambert_Stolze_Katzenmutter.jpg</text:a>) by Louis-Eugène Lambert. 1900</text:p>
          </table:table-cell>
          <table:table-cell office:value-type="string" calcext:value-type="string">
            <text:p>Louis-Eugène Lambert</text:p>
          </table:table-cell>
          <table:table-cell office:value-type="string" calcext:value-type="string">
            <text:p>French</text:p>
          </table:table-cell>
          <table:table-cell office:value-type="string" calcext:value-type="string">
            <text:p>animals</text:p>
          </table:table-cell>
        </table:table-row>
        <table:table-row table:style-name="ro2">
          <table:table-cell office:value-type="string" calcext:value-type="string">
            <text:p>At_the_Bazaar_by_Jean-Joseph_Benjamin-Constant.jpg</text:p>
          </table:table-cell>
          <table:table-cell office:value-type="float" office:value="1902" calcext:value-type="float">
            <text:p>1902</text:p>
          </table:table-cell>
          <table:table-cell office:value-type="string" calcext:value-type="string">
            <text:p>Jean Joseph Benjamin Constant - At the Bazaar</text:p>
          </table:table-cell>
          <table:table-cell office:value-type="string" calcext:value-type="string">
            <text:p>[At the Bazaar](<text:a xlink:href="https://commons.wikimedia.org/wiki/File:At_the_Bazaar_by_Jean-Joseph_Benjamin-Constant.jpg" xlink:type="simple">https://commons.wikimedia.org/wiki/File:At_the_Bazaar_by_Jean-Joseph_Benjamin-Constant.jpg</text:a>) by Jean Joseph Benjamin Constant</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Jean_Joseph_Benjamin_Constant_(French,_1845-1902)-An_Afternoon_Idyll,_signed_'Benj._Constant'_(lower_left).png</text:p>
          </table:table-cell>
          <table:table-cell office:value-type="float" office:value="1902" calcext:value-type="float">
            <text:p>1902</text:p>
          </table:table-cell>
          <table:table-cell office:value-type="string" calcext:value-type="string">
            <text:p>Jean Joseph Benjamin Constant - An Afternoon Idyll</text:p>
          </table:table-cell>
          <table:table-cell office:value-type="string" calcext:value-type="string">
            <text:p>[An Afternoon Idyll](&lt;<text:a xlink:href="https://commons.wikimedia.org/wiki/File:Jean_Joseph_Benjamin_Constant_(French,_1845-1902)-An_Afternoon_Idyll,_signed_%27Benj._Constant%27_(lower_left).png" xlink:type="simple">https://commons.wikimedia.org/wiki/File:Jean_Joseph_Benjamin_Constant_(French,_1845-1902)-An_Afternoon_Idyll,_signed_%27Benj._Constant%27_(lower_left).png</text:a>&gt;) by Jean Joseph Benjamin Constant</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3">
          <table:table-cell office:value-type="string" calcext:value-type="string">
            <text:p>the_hermit_1960.6.8.jpg</text:p>
          </table:table-cell>
          <table:table-cell office:value-type="float" office:value="1670" calcext:value-type="float">
            <text:p>1670</text:p>
          </table:table-cell>
          <table:table-cell office:value-type="string" calcext:value-type="string">
            <text:p>A pale-skinned, balding man with a fringe of white hair and a long, wispy gray beard kneels with his fingers intertwined in prayer in a shadowy grotto-like space in this vertical painting. He faces our right in profile, and his eyes look up at a crucifix propped against several woven baskets leaning against a moss-covered, gnarled tree. His hands rest on the open pages of a large book at the base of the crucifix. He wears a dark tawny-brown robe with a voluminous hood, and a string of thick rosary beads hanging from his waist ends with a tiny skull and a cross. A brick archway frames him, and another archway is seen through the opening. An unlit lantern hangs from the tree over the crucifix. The book, baskets, and crucifix along with a skull and hourglass sit on a rock covered by a cloth. An overturned pottery jug, a water jug, and a horse’s skull rest among a tall thistle plant and grass at the foot of the rock, in the lower right corner of the panel. </text:p>
          </table:table-cell>
          <table:table-cell office:value-type="string" calcext:value-type="string">
            <text:p>[The Hermit](<text:a xlink:href="https://www.nga.gov/artworks/46032-hermit" xlink:type="simple">https://www.nga.gov/artworks/46032-hermit</text:a>) by Gerrit Dou. 1670</text:p>
          </table:table-cell>
          <table:table-cell office:value-type="string" calcext:value-type="string">
            <text:p>Gerrit Dou</text:p>
          </table:table-cell>
          <table:table-cell office:value-type="string" calcext:value-type="string">
            <text:p>Dutch</text:p>
          </table:table-cell>
          <table:table-cell office:value-type="string" calcext:value-type="string">
            <text:p>people</text:p>
          </table:table-cell>
        </table:table-row>
        <table:table-row table:style-name="ro3">
          <table:table-cell office:value-type="string" calcext:value-type="string">
            <text:p>the_milk_maid_1975.92.11.jpg</text:p>
          </table:table-cell>
          <table:table-cell office:value-type="float" office:value="1878" calcext:value-type="float">
            <text:p>1878</text:p>
          </table:table-cell>
          <table:table-cell office:value-type="string" calcext:value-type="string">
            <text:p>A pale-skinned young woman stands facing our right on a grassy hillside also occupied by two cows, a rooster, and a chicken in this vertical watercolor. The palette is dominated with olive, forest, and sage green with touches of mauve pink, brown, and black. The woman’s body is angled slightly toward us, but her head turns away so we see her in profile. She wears a long, pale mauve-pink dress with a charcoal-gray and rust-brown scarf draped over her shoulders. White stockings and brown shoes peek out from under the ankle-length hem. A boxy, pale pink form, perhaps a bonnet, hangs down her back from a slender ribbon around the front of her neck. Her arms rest at her sides as she holds a small wooden stool in one hand and the handle of a wooden pail in the other. Just in front of her feet, a caramel-brown chicken pecks at the ground as the rooster, with a flounce of black tail feathers, looks alertly into the distance. The cluster of trees in the near distance beyond the young woman nearly fill the rest of the scene with their leafy canopies. Two cows are under the trees, one to either side of the woman. A chocolate-brown cow with a white face lies down on the left, while a ginger-brown cow stands on the right. Sunlight peeks in through a few gaps in the leaves. A portion of a distant slate-blue mountain and patch of pale peach sky are visible over the cow’s head in the lower left. The artist signed and dated the lower left, “HOMER 1878.” </text:p>
          </table:table-cell>
          <table:table-cell office:value-type="string" calcext:value-type="string">
            <text:p>[The Milk Maid](<text:a xlink:href="https://www.nga.gov/artworks/55586-milk-maid" xlink:type="simple">https://www.nga.gov/artworks/55586-milk-maid</text:a>) by Winslow Homer. 1878</text:p>
          </table:table-cell>
          <table:table-cell office:value-type="string" calcext:value-type="string">
            <text:p>Winslow Homer</text:p>
          </table:table-cell>
          <table:table-cell office:value-type="string" calcext:value-type="string">
            <text:p>American</text:p>
          </table:table-cell>
          <table:table-cell office:value-type="string" calcext:value-type="string">
            <text:p>people, animals</text:p>
          </table:table-cell>
        </table:table-row>
        <table:table-row table:style-name="ro2">
          <table:table-cell office:value-type="string" calcext:value-type="string">
            <text:p>ep16.95.R.jpg</text:p>
          </table:table-cell>
          <table:table-cell office:value-type="float" office:value="1870" calcext:value-type="float">
            <text:p>1870</text:p>
          </table:table-cell>
          <table:table-cell office:value-type="string" calcext:value-type="string">
            <text:p>Salome, Henri Regnault (French, Paris 1843–1871 Buzenval), Oil on canvas</text:p>
          </table:table-cell>
          <table:table-cell office:value-type="string" calcext:value-type="string">
            <text:p>[Salome](<text:a xlink:href="https://www.metmuseum.org/art/collection/search/437384" xlink:type="simple">https://www.metmuseum.org/art/collection/search/437384</text:a>) by Henri Regnault. 1870</text:p>
          </table:table-cell>
          <table:table-cell office:value-type="string" calcext:value-type="string">
            <text:p>Henri Regnault</text:p>
          </table:table-cell>
          <table:table-cell office:value-type="string" calcext:value-type="string">
            <text:p>French</text:p>
          </table:table-cell>
          <table:table-cell office:value-type="string" calcext:value-type="string">
            <text:p>people</text:p>
          </table:table-cell>
        </table:table-row>
        <table:table-row table:style-name="ro3">
          <table:table-cell office:value-type="string" calcext:value-type="string">
            <text:p>248953fgsdl.jpg</text:p>
          </table:table-cell>
          <table:table-cell office:value-type="float" office:value="1867" calcext:value-type="float">
            <text:p>1867</text:p>
          </table:table-cell>
          <table:table-cell office:value-type="string" calcext:value-type="string">
            <text:p>Frédéric Bazille - Thérèse lisant dans le parc de Méric</text:p>
          </table:table-cell>
          <table:table-cell office:value-type="string" calcext:value-type="string">
            <text:p>[Thérèse lisant dans le parc de Méric](<text:a xlink:href="https://artvee.com/dl/therese-lisant-dans-le-parc-de-meric/" xlink:type="simple">https://artvee.com/dl/therese-lisant-dans-le-parc-de-meric/</text:a>) by Frédéric Bazille. 1867</text:p>
          </table:table-cell>
          <table:table-cell office:value-type="string" calcext:value-type="string">
            <text:p>Frédéric Bazille</text:p>
          </table:table-cell>
          <table:table-cell office:value-type="string" calcext:value-type="string">
            <text:p>French</text:p>
          </table:table-cell>
          <table:table-cell office:value-type="string" calcext:value-type="string">
            <text:p>people, flowers</text:p>
          </table:table-cell>
        </table:table-row>
        <table:table-row table:style-name="ro2">
          <table:table-cell office:value-type="string" calcext:value-type="string">
            <text:p>DP-15904-001.jpg</text:p>
          </table:table-cell>
          <table:table-cell office:value-type="float" office:value="1636" calcext:value-type="float">
            <text:p>1636</text:p>
          </table:table-cell>
          <table:table-cell office:value-type="string" calcext:value-type="string">
            <text:p>The Smokers, Adriaen Brouwer (Flemish, Oudenaarde 1605/6–1638 Antwerp), Oil on wood</text:p>
          </table:table-cell>
          <table:table-cell office:value-type="string" calcext:value-type="string">
            <text:p>[The Smokers](<text:a xlink:href="https://www.metmuseum.org/art/collection/search/435807" xlink:type="simple">https://www.metmuseum.org/art/collection/search/435807</text:a>) by Adriaen Brouwer. c. 1636</text:p>
          </table:table-cell>
          <table:table-cell office:value-type="string" calcext:value-type="string">
            <text:p>Adriaen Brouwer</text:p>
          </table:table-cell>
          <table:table-cell office:value-type="string" calcext:value-type="string">
            <text:p>Flemish</text:p>
          </table:table-cell>
          <table:table-cell office:value-type="string" calcext:value-type="string">
            <text:p>people</text:p>
          </table:table-cell>
        </table:table-row>
        <table:table-row table:style-name="ro1" table:number-rows-repeated="1048554">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 style:data-style-name="N2" text:time-value="21:49:32.1126616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8T12:08:15.656798270</meta:creation-date>
    <dc:date>2026-04-28T22:21:17.539896868</dc:date>
    <meta:editing-duration>PT47M6S</meta:editing-duration>
    <meta:editing-cycles>10</meta:editing-cycles>
    <meta:generator>LibreOffice/25.8.6.2$Linux_X86_64 LibreOffice_project/580$Build-2</meta:generator>
    <meta:document-statistic meta:table-count="1" meta:cell-count="147" meta:object-count="0"/>
  </office:meta>
</office:document-meta>
</file>