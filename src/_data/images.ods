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3.0193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vanitas_still_life_1995.74.2.jpg</text:p>
          </table:table-cell>
          <table:table-cell office:value-type="float" office:value="1665" calcext:value-type="float">
            <text:p>1665</text:p>
          </table:table-cell>
          <table:table-cell table:style-name="ce1" office:value-type="string" calcext:value-type="string">
            <text:p>A still life featuring a skull adorned with a crown, surrounded by pink roses, a glass hourglass, a small gold container, and various butterflies. Bubbles are floating around the arrangement.</text:p>
          </table:table-cell>
          <table:table-cell office:value-type="string" calcext:value-type="string">
            <text:p>[Vanitas Still Life](<text:a xlink:href="https://www.nga.gov/artworks/93323-vanitas-still-life" xlink:type="simple">https://www.nga.gov/artworks/93323-vanitas-still-life</text:a>) by Jan van Kessel the Elder. c. 1665/1670</text:p>
          </table:table-cell>
          <table:table-cell office:value-type="string" calcext:value-type="string">
            <text:p>Jan van Kessel the Elder</text:p>
          </table:table-cell>
          <table:table-cell office:value-type="string" calcext:value-type="string">
            <text:p>Flemish</text:p>
          </table:table-cell>
          <table:table-cell office:value-type="string" calcext:value-type="string">
            <text:p>flowers</text:p>
          </table:table-cell>
        </table:table-row>
        <table:table-row table:style-name="ro2">
          <table:table-cell office:value-type="string" calcext:value-type="string">
            <text:p>a_chief_of_abyssinia_2014.136.74.jpg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A portrait of a man with dark, curly hair, gazing upwards, wearing a red garment against a warm yellow background.</text:p>
          </table:table-cell>
          <table:table-cell office:value-type="string" calcext:value-type="string">
            <text:p>[A Chief of Abyssinia](<text:a xlink:href="https://www.nga.gov/artworks/168756-chief-abyssinia" xlink:type="simple">https://www.nga.gov/artworks/168756-chief-abyssinia</text:a>) by Henri Regnault. c. 1870</text:p>
          </table:table-cell>
          <table:table-cell office:value-type="string" calcext:value-type="string">
            <text:p>Henri Regnaul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the_favorite_of_the_emir_2010.95.1.jpg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 man playing a lute is seated behind two women lounging in colorful, ornate clothing. One woman reclines on a couch, while the other rests her head on her hand, with a scenic view of the sea and architecture in the background.</text:p>
          </table:table-cell>
          <table:table-cell office:value-type="string" calcext:value-type="string">
            <text:p>[The Favorite of the Emir](<text:a xlink:href="https://www.nga.gov/artworks/75181-favorite-emir" xlink:type="simple">https://www.nga.gov/artworks/75181-favorite-emir</text:a>) by Jean Joseph Benjamin Constant. c. 1879</text:p>
          </table:table-cell>
          <table:table-cell office:value-type="string" calcext:value-type="string">
            <text:p>Jean Joseph Benjamin Constan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poppies_isles_of_shoals_1997.135.1.jpg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Coastal scene with vibrant red and pink flowers in the foreground, rocky shoreline, and calm blue sea with distant sailboats under a clear sky.</text:p>
          </table:table-cell>
          <table:table-cell office:value-type="string" calcext:value-type="string">
            <text:p>[Poppies, Isles of Shoals](<text:a xlink:href="https://www.nga.gov/artworks/103172-poppies-isles-shoals" xlink:type="simple">https://www.nga.gov/artworks/103172-poppies-isles-shoals</text:a>) by Childe Hassam. 1891</text:p>
          </table:table-cell>
          <table:table-cell office:value-type="string" calcext:value-type="string">
            <text:p>Childe Hassam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landscape, flowers</text:p>
          </table:table-cell>
        </table:table-row>
        <table:table-row table:style-name="ro2">
          <table:table-cell office:value-type="string" calcext:value-type="string">
            <text:p>nonchaloir_repose_1948.16.1.jpg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 woman in a luxurious, reflective gown reclines on a gray sofa. Her eyes are closed, conveying a serene or contemplative mood.</text:p>
          </table:table-cell>
          <table:table-cell office:value-type="string" calcext:value-type="string">
            <text:p>[Nonchaloir (Repose)](<text:a xlink:href="https://www.nga.gov/artworks/35080-nonchaloir-repose" xlink:type="simple">https://www.nga.gov/artworks/35080-nonchaloir-repose</text:a>) by John Singer Sargent. 1911</text:p>
          </table:table-cell>
          <table:table-cell office:value-type="string" calcext:value-type="string">
            <text:p>John Singer Sargent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regatta_at_argenteuil_1970.17.59.jpg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Impressionist painting of sailboats on a river, with spectators on a lush, grassy bank. The scene is serene and bathed in soft pastel hues.</text:p>
          </table:table-cell>
          <table:table-cell office:value-type="string" calcext:value-type="string">
            <text:p>[Regatta at Argenteuil](<text:a xlink:href="https://www.nga.gov/artworks/52203-regatta-argenteuil" xlink:type="simple">https://www.nga.gov/artworks/52203-regatta-argenteuil</text:a>) by Auguste Renoir. 1874</text:p>
          </table:table-cell>
          <table:table-cell office:value-type="string" calcext:value-type="string">
            <text:p>Auguste Renoi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andscape</text:p>
          </table:table-cell>
        </table:table-row>
        <table:table-row table:style-name="ro2">
          <table:table-cell office:value-type="string" calcext:value-type="string">
            <text:p>young_woman_with_peonies_1983.1.6.jpg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Woman with brown skin offers peonies over a large basket of colorful flowers, wearing a cream blouse and plaid headscarf, against gray background.</text:p>
          </table:table-cell>
          <table:table-cell office:value-type="string" calcext:value-type="string">
            <text:p>[Young Woman with Peonies](<text:a xlink:href="https://www.nga.gov/artworks/61356-young-woman-peonies" xlink:type="simple">https://www.nga.gov/artworks/61356-young-woman-peonies</text:a>) by Frédéric Bazille. 1870</text:p>
          </table:table-cell>
          <table:table-cell office:value-type="string" calcext:value-type="string">
            <text:p>Frédéric Bazill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, flowers</text:p>
          </table:table-cell>
        </table:table-row>
        <table:table-row table:style-name="ro2">
          <table:table-cell office:value-type="string" calcext:value-type="string">
            <text:p>flowers_in_a_vase_1976.26.2.jp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Lush bouquet in bronze urn with roses, tulip, poppy, insects and snail on stone ledge, set against a dark shadowy background.</text:p>
          </table:table-cell>
          <table:table-cell office:value-type="string" calcext:value-type="string">
            <text:p>[Flowers in a Vase](<text:a xlink:href="https://www.nga.gov/artworks/55782-flowers-vase" xlink:type="simple">https://www.nga.gov/artworks/55782-flowers-vase</text:a>) by Philip van Kouwenbergh. c. 1700</text:p>
          </table:table-cell>
          <table:table-cell office:value-type="string" calcext:value-type="string">
            <text:p>Philip van Kouwenbergh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lowers</text:p>
          </table:table-cell>
        </table:table-row>
        <table:table-row table:style-name="ro2">
          <table:table-cell office:value-type="string" calcext:value-type="string">
            <text:p>miss_beatrice_townsend_2006.128.31.jpg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Young girl in black dress with red sash holds a terrier, gazing forward against a warm brown background.</text:p>
          </table:table-cell>
          <table:table-cell office:value-type="string" calcext:value-type="string">
            <text:p>[Miss Beatrice Townsend](<text:a xlink:href="https://www.nga.gov/artworks/96999-miss-beatrice-townsend" xlink:type="simple">https://www.nga.gov/artworks/96999-miss-beatrice-townsend</text:a>) by John Singer Sargent. 1882</text:p>
          </table:table-cell>
          <table:table-cell office:value-type="string" calcext:value-type="string">
            <text:p>John Singer Sargent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eople, animals</text:p>
          </table:table-cell>
        </table:table-row>
        <table:table-row table:style-name="ro2">
          <table:table-cell office:value-type="string" calcext:value-type="string">
            <text:p>Louis_Eugène_Lambert_-_Family_of_Cats_and_a_Dog_in_the_Salon.jpg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Opulent room with ornate gold furnishings, three cats on a blue armchair, a small dog on the floor, and a grand clock on the desk. A serene, classical mural adorns the wall.</text:p>
          </table:table-cell>
          <table:table-cell office:value-type="string" calcext:value-type="string">
            <text:p>[Family of Cats and a Dog](<text:a xlink:href="https://commons.wikimedia.org/wiki/File:Louis_Eugène_Lambert_-_Family_of_Cats_and_a_Dog_in_the_Salon.jpg" xlink:type="simple">https://commons.wikimedia.org/wiki/File:Louis_Eug%C3%A8ne_Lambert_-_Family_of_Cats_and_a_Dog_in_the_Salon.jpg</text:a>) in the Salon by Louis-Eugène Lambert. 1893</text:p>
          </table:table-cell>
          <table:table-cell office:value-type="string" calcext:value-type="string">
            <text:p>Louis-Eugène Lamber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animals</text:p>
          </table:table-cell>
        </table:table-row>
        <table:table-row table:style-name="ro2">
          <table:table-cell office:value-type="string" calcext:value-type="string">
            <text:p>Winslow_Homer_-_The_Four_Leaf_Clover.jpg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A girl in a white dress and hat sits on grass near a window surrounded by lush plants and ivy.</text:p>
          </table:table-cell>
          <table:table-cell office:value-type="string" calcext:value-type="string">
            <text:p>[The Four Leaf Clover](<text:a xlink:href="https://dia.org/collection/four-leaf-clover/48265" xlink:type="simple">https://dia.org/collection/four-leaf-clover/48265</text:a>) by Winslow Homer. 1873</text:p>
          </table:table-cell>
          <table:table-cell office:value-type="string" calcext:value-type="string">
            <text:p>Winslow Home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748e6f4ad2d0a05aaff5b5fac6edefe2.jpg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A dimly lit room with a sick woman in a chair attended by three people. A figure in elegant robes holds a flask.</text:p>
          </table:table-cell>
          <table:table-cell office:value-type="string" calcext:value-type="string">
            <text:p>[The Dropsical Woman](<text:a xlink:href="https://www.wikiart.org/en/gerrit-dou/the-dropsical-woman" xlink:type="simple">https://www.wikiart.org/en/gerrit-dou/the-dropsical-woman</text:a>) by Gerrit Dou. c. 1663</text:p>
          </table:table-cell>
          <table:table-cell office:value-type="string" calcext:value-type="string">
            <text:p>Gerrit Dou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DP3572.jpeg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A serene garden scene with lush greenery. A woman in a white dress holds pink flowers on a sunny path, surrounded by blooming bushes and a basket of flowers.</text:p>
          </table:table-cell>
          <table:table-cell office:value-type="string" calcext:value-type="string">
            <text:p>[Gathering Flowers in a French Garden](<text:a xlink:href="https://worcester.emuseum.com/objects/20384/gathering-flowers-in-a-french-garden" xlink:type="simple">https://worcester.emuseum.com/objects/20384/gathering-flowers-in-a-french-garden</text:a>) by Childe Hassam. 1888</text:p>
          </table:table-cell>
          <table:table-cell office:value-type="string" calcext:value-type="string">
            <text:p>Childe Hassam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eople, flowers</text:p>
          </table:table-cell>
        </table:table-row>
        <table:table-row table:style-name="ro2">
          <table:table-cell office:value-type="string" calcext:value-type="string">
            <text:p>after_the_storm_2016.22.7.jp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ailboats tilt on choppy gray waves under dark clouds, sunlight catching a yellow sail as seabirds skim the water. </text:p>
          </table:table-cell>
          <table:table-cell office:value-type="string" calcext:value-type="string">
            <text:p>[After the Storm](<text:a xlink:href="https://www.nga.gov/artworks/195505-after-storm" xlink:type="simple">https://www.nga.gov/artworks/195505-after-storm</text:a>) by Willem van de Velde the Younger and Studio. c. 1700</text:p>
          </table:table-cell>
          <table:table-cell office:value-type="string" calcext:value-type="string">
            <text:p>Willem van de Velde the Younger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andscape</text:p>
          </table:table-cell>
        </table:table-row>
        <table:table-row table:style-name="ro2">
          <table:table-cell office:value-type="string" calcext:value-type="string">
            <text:p>woman_with_a_cat_1950.12.1.jpg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Young woman in white sits in armchair, cuddling a striped cat against a soft green background with colorful brushstrokes. </text:p>
          </table:table-cell>
          <table:table-cell office:value-type="string" calcext:value-type="string">
            <text:p>[Woman with a Cat](<text:a xlink:href="https://www.nga.gov/artworks/37637-woman-cat" xlink:type="simple">https://www.nga.gov/artworks/37637-woman-cat</text:a>) by Auguste Renoir. c. 1875</text:p>
          </table:table-cell>
          <table:table-cell office:value-type="string" calcext:value-type="string">
            <text:p>Auguste Renoi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, animals</text:p>
          </table:table-cell>
        </table:table-row>
        <table:table-row table:style-name="ro2">
          <table:table-cell office:value-type="string" calcext:value-type="string">
            <text:p>youth_making_a_face_1994.46.1.jpg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Young man in a hat pulls his mouth wide with fingers at a table. </text:p>
          </table:table-cell>
          <table:table-cell office:value-type="string" calcext:value-type="string">
            <text:p>[Youth Making a Face](<text:a xlink:href="https://www.nga.gov/artworks/86204-youth-making-face" xlink:type="simple">https://www.nga.gov/artworks/86204-youth-making-face</text:a>) by Adriaen Brouwer. c. 1632/1635</text:p>
          </table:table-cell>
          <table:table-cell office:value-type="string" calcext:value-type="string">
            <text:p>Adriaen Brouwer</text:p>
          </table:table-cell>
          <table:table-cell office:value-type="string" calcext:value-type="string">
            <text:p>Flemish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Louis_Eugène_Lambert_Stolze_Katzenmutter.jpg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 mother cat and three kittens sit on the floor surrounded by bright red yarn balls.</text:p>
          </table:table-cell>
          <table:table-cell office:value-type="string" calcext:value-type="string">
            <text:p>[Stolze Katzenmutter](<text:a xlink:href="https://commons.wikimedia.org/wiki/File:Louis_Eugène_Lambert_Stolze_Katzenmutter.jpg" xlink:type="simple">https://commons.wikimedia.org/wiki/File:Louis_Eug%C3%A8ne_Lambert_Stolze_Katzenmutter.jpg</text:a>) by Louis-Eugène Lambert. 1900</text:p>
          </table:table-cell>
          <table:table-cell office:value-type="string" calcext:value-type="string">
            <text:p>Louis-Eugène Lamber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animals</text:p>
          </table:table-cell>
        </table:table-row>
        <table:table-row table:style-name="ro2">
          <table:table-cell office:value-type="string" calcext:value-type="string">
            <text:p>At_the_Bazaar_by_Jean-Joseph_Benjamin-Constant.jpg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 visually rich scene depicts five men in traditional Middle Eastern attire inside a market, surrounded by vibrant carpets and ornate pottery, engaging in discussion.</text:p>
          </table:table-cell>
          <table:table-cell office:value-type="string" calcext:value-type="string">
            <text:p>[At the Bazaar](<text:a xlink:href="https://commons.wikimedia.org/wiki/File:At_the_Bazaar_by_Jean-Joseph_Benjamin-Constant.jpg" xlink:type="simple">https://commons.wikimedia.org/wiki/File:At_the_Bazaar_by_Jean-Joseph_Benjamin-Constant.jpg</text:a>) by Jean Joseph Benjamin Constant</text:p>
          </table:table-cell>
          <table:table-cell office:value-type="string" calcext:value-type="string">
            <text:p>Jean Joseph Benjamin Constan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an-afternoon-idyll.png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 group of people in colorful, traditional clothing relax on a sunlit terrace. The scene overlooks a coastal town with a bright blue sky.</text:p>
          </table:table-cell>
          <table:table-cell office:value-type="string" calcext:value-type="string">
            <text:p>[An Afternoon Idyll](&lt;<text:a xlink:href="https://commons.wikimedia.org/wiki/File:Jean_Joseph_Benjamin_Constant_(French,_1845-1902)-An_Afternoon_Idyll,_signed_%27Benj._Constant%27_(lower_left).png" xlink:type="simple">https://commons.wikimedia.org/wiki/File:Jean_Joseph_Benjamin_Constant_(French,_1845-1902)-An_Afternoon_Idyll,_signed_%27Benj._Constant%27_(lower_left).png</text:a>&gt;) by Jean Joseph Benjamin Constant</text:p>
          </table:table-cell>
          <table:table-cell office:value-type="string" calcext:value-type="string">
            <text:p>Jean Joseph Benjamin Constan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office:value-type="string" calcext:value-type="string">
            <text:p>the_hermit_1960.6.8.jpg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Old bearded man kneels in prayer before a crucifix in a shadowy, brick-arched grotto. </text:p>
          </table:table-cell>
          <table:table-cell office:value-type="string" calcext:value-type="string">
            <text:p>[The Hermit](<text:a xlink:href="https://www.nga.gov/artworks/46032-hermit" xlink:type="simple">https://www.nga.gov/artworks/46032-hermit</text:a>) by Gerrit Dou. 1670</text:p>
          </table:table-cell>
          <table:table-cell office:value-type="string" calcext:value-type="string">
            <text:p>Gerrit Dou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office:value-type="string" calcext:value-type="string">
            <text:p>the_milk_maid_1975.92.11.jpg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Young woman in pink dress holding stool and pail stands with cows and chickens on a hill.</text:p>
          </table:table-cell>
          <table:table-cell office:value-type="string" calcext:value-type="string">
            <text:p>[The Milk Maid](<text:a xlink:href="https://www.nga.gov/artworks/55586-milk-maid" xlink:type="simple">https://www.nga.gov/artworks/55586-milk-maid</text:a>) by Winslow Homer. 1878</text:p>
          </table:table-cell>
          <table:table-cell office:value-type="string" calcext:value-type="string">
            <text:p>Winslow Home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eople, animals</text:p>
          </table:table-cell>
        </table:table-row>
        <table:table-row table:style-name="ro3">
          <table:table-cell office:value-type="string" calcext:value-type="string">
            <text:p>the_return_2014.79.12.jpg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Sunlit landscape featuring a stone church and a procession carrying an armored man on a stretcher.</text:p>
          </table:table-cell>
          <table:table-cell office:value-type="string" calcext:value-type="string">
            <text:p>[The Return](<text:a xlink:href="https://www.nga.gov/artworks/166438-return" xlink:type="simple">https://www.nga.gov/artworks/166438-return</text:a>) by Thomas Cole. 1837</text:p>
          </table:table-cell>
          <table:table-cell office:value-type="string" calcext:value-type="string">
            <text:p>Thomas Col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landscape</text:p>
          </table:table-cell>
        </table:table-row>
        <table:table-row table:style-name="ro3">
          <table:table-cell office:value-type="string" calcext:value-type="string">
            <text:p>ep16.95.R.jpg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A woman in an ornate yellow and gold dress sits against a yellow backdrop. On her lap is a tray with a sheathed short sword which she holds with her left hand, exuding a serene and confident demeanor.</text:p>
          </table:table-cell>
          <table:table-cell office:value-type="string" calcext:value-type="string">
            <text:p>[Salome](<text:a xlink:href="https://www.metmuseum.org/art/collection/search/437384" xlink:type="simple">https://www.metmuseum.org/art/collection/search/437384</text:a>) by Henri Regnault. 1870</text:p>
          </table:table-cell>
          <table:table-cell office:value-type="string" calcext:value-type="string">
            <text:p>Henri Regnaul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office:value-type="string" calcext:value-type="string">
            <text:p>248953fgsdl.jpg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A woman in a long, dark dress reads a book while sitting in a chair in a lush garden. She is surrounded by trees and vibrant flowers, creating a serene atmosphere.</text:p>
          </table:table-cell>
          <table:table-cell office:value-type="string" calcext:value-type="string">
            <text:p>[Thérèse lisant dans le parc de Méric](<text:a xlink:href="https://artvee.com/dl/therese-lisant-dans-le-parc-de-meric/" xlink:type="simple">https://artvee.com/dl/therese-lisant-dans-le-parc-de-meric/</text:a>) by Frédéric Bazille. 1867</text:p>
          </table:table-cell>
          <table:table-cell office:value-type="string" calcext:value-type="string">
            <text:p>Frédéric Bazill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, flowers</text:p>
          </table:table-cell>
        </table:table-row>
        <table:table-row table:style-name="ro3">
          <table:table-cell office:value-type="string" calcext:value-type="string">
            <text:p>odalisque_1963.10.207.jpg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Reclining woman wearing a white blouse, red vest, and patterned pants lies on pillows.</text:p>
          </table:table-cell>
          <table:table-cell office:value-type="string" calcext:value-type="string">
            <text:p>[Odalisque](<text:a xlink:href="https://www.nga.gov/artworks" xlink:type="simple">https://www.nga.gov/artworks</text:a>/46682-odalisque) by Auguste Renoir. 1870</text:p>
          </table:table-cell>
          <table:table-cell office:value-type="string" calcext:value-type="string">
            <text:p>Auguste Renoi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DP-15904-001.jpg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A group of animated men gather around a table in a dimly lit room, laughing, drinking, and smoking.</text:p>
          </table:table-cell>
          <table:table-cell office:value-type="string" calcext:value-type="string">
            <text:p>[The Smokers](<text:a xlink:href="https://www.metmuseum.org/art/collection/search/435807" xlink:type="simple">https://www.metmuseum.org/art/collection/search/435807</text:a>) by Adriaen Brouwer. c. 1636</text:p>
          </table:table-cell>
          <table:table-cell office:value-type="string" calcext:value-type="string">
            <text:p>Adriaen Brouwer</text:p>
          </table:table-cell>
          <table:table-cell office:value-type="string" calcext:value-type="string">
            <text:p>Flemish</text:p>
          </table:table-cell>
          <table:table-cell office:value-type="string" calcext:value-type="string">
            <text:p>people</text:p>
          </table:table-cell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08:27:57.911213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2:08:15.656798270</meta:creation-date>
    <dc:date>2026-05-06T11:28:57.886095771</dc:date>
    <meta:editing-duration>PT7H11M</meta:editing-duration>
    <meta:editing-cycles>36</meta:editing-cycles>
    <meta:generator>LibreOffice/25.8.6.2$Linux_X86_64 LibreOffice_project/580$Build-2</meta:generator>
    <meta:document-statistic meta:table-count="1" meta:cell-count="189" meta:object-count="0"/>
  </office:meta>
</office:document-meta>
</file>